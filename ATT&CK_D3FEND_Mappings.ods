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539in" fo:break-before="auto" style:use-optimal-row-height="true"/>
    </style:style>
    <style:style style:name="ro4" style:family="table-row">
      <style:table-row-properties style:row-height="0.434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ro10" style:family="table-row">
      <style:table-row-properties style:row-height="0.9535in" fo:break-before="auto" style:use-optimal-row-height="true"/>
    </style:style>
    <style:style style:name="ro11" style:family="table-row">
      <style:table-row-properties style:row-height="2.3528in" fo:break-before="auto" style:use-optimal-row-height="true"/>
    </style:style>
    <style:style style:name="ro12" style:family="table-row">
      <style:table-row-properties style:row-height="1.3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ATT&amp;CK ID</text:p>
          </table:table-cell>
          <table:table-cell table:style-name="ce1" office:value-type="string" calcext:value-type="string">
            <text:p>ATT&amp;CK Enterprise Mitigation</text:p>
          </table:table-cell>
          <table:table-cell table:style-name="ce1" office:value-type="string" calcext:value-type="string">
            <text:p>Related D3FEND Techniques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M1013</text:p>
          </table:table-cell>
          <table:table-cell office:value-type="string" calcext:value-type="string">
            <text:p><text:a xlink:href="https://attack.mitre.org/mitigations/M1013/" xlink:type="simple">Application Developer Guidance</text:a></text:p>
          </table:table-cell>
          <table:table-cell table:style-name="ce3"/>
          <table:table-cell table:style-name="ce4" office:value-type="string" calcext:value-type="string">
            <text:p>A future release of D3FEND will define a taxonomy of Source Code Hardening Techniques.</text:p>
          </table:table-cell>
        </table:table-row>
        <table:table-row table:style-name="ro3">
          <table:table-cell office:value-type="string" calcext:value-type="string">
            <text:p>M1015</text:p>
          </table:table-cell>
          <table:table-cell office:value-type="string" calcext:value-type="string">
            <text:p><text:a xlink:href="https://attack.mitre.org/mitigations/M1015/" xlink:type="simple">Active Directory Configuration</text:a></text:p>
          </table:table-cell>
          <table:table-cell office:value-type="string" calcext:value-type="string">
            <text:p>D3-DTP <text:a xlink:href="https://d3fend.mitre.org/technique/d3f:DomainTrustPolicy" xlink:type="simple">Domain Trust Policy</text:a>D3-ANCI <text:a xlink:href="https://d3fend.mitre.org/technique/d3f:AuthenticationCacheInvalidation" xlink:type="simple">Authentication Cache Invalidation</text:a>D3-UAP <text:a xlink:href="https://d3fend.mitre.org/technique/d3f:UserAccountPermissions" xlink:type="simple">User Account Permissions</text:a></text:p>
          </table:table-cell>
          <table:table-cell table:style-name="ce4" office:value-type="string" calcext:value-type="string">
            <text:p>M1015 scope is broad, touches on an wide variety of techniques in D3FEND.</text:p>
          </table:table-cell>
        </table:table-row>
        <table:table-row table:style-name="ro4">
          <table:table-cell office:value-type="string" calcext:value-type="string">
            <text:p>M1016</text:p>
          </table:table-cell>
          <table:table-cell office:value-type="string" calcext:value-type="string">
            <text:p><text:a xlink:href="https://attack.mitre.org/mitigations/M1016/" xlink:type="simple">Vulnerability Scanning</text:a></text:p>
          </table:table-cell>
          <table:table-cell table:style-name="ce3"/>
          <table:table-cell table:style-name="ce4" office:value-type="string" calcext:value-type="string">
            <text:p>Future D3FEND releases will model the scanning and inventory domains.</text:p>
          </table:table-cell>
        </table:table-row>
        <table:table-row table:style-name="ro5">
          <table:table-cell office:value-type="string" calcext:value-type="string">
            <text:p>M1017</text:p>
          </table:table-cell>
          <table:table-cell office:value-type="string" calcext:value-type="string">
            <text:p><text:a xlink:href="https://attack.mitre.org/mitigations/M1017/" xlink:type="simple">User Training</text:a></text:p>
          </table:table-cell>
          <table:table-cell table:style-name="ce3"/>
          <table:table-cell table:style-name="ce4" office:value-type="string" calcext:value-type="string">
            <text:p>Modeling user training is outside the scope of D3FEND.</text:p>
          </table:table-cell>
        </table:table-row>
        <table:table-row table:style-name="ro1">
          <table:table-cell office:value-type="string" calcext:value-type="string">
            <text:p>M1018</text:p>
          </table:table-cell>
          <table:table-cell office:value-type="string" calcext:value-type="string">
            <text:p><text:a xlink:href="https://attack.mitre.org/mitigations/M1018/" xlink:type="simple">User Account Management</text:a></text:p>
          </table:table-cell>
          <table:table-cell office:value-type="string" calcext:value-type="string">
            <text:p>D3-LFP <text:a xlink:href="https://d3fend.mitre.org/technique/d3f:LocalFilePermissions" xlink:type="simple">Local File Permissions</text:a>D3-SCF <text:a xlink:href="https://d3fend.mitre.org/technique/d3f:SystemCallFiltering" xlink:type="simple">System Call Filtering</text:a>D3-SCP <text:a xlink:href="https://d3fend.mitre.org/technique/d3f:SystemConfigurationPermissions" xlink:type="simple">System Configuration Permissions</text:a></text:p>
          </table:table-cell>
          <table:table-cell/>
        </table:table-row>
        <table:table-row table:style-name="ro3">
          <table:table-cell office:value-type="string" calcext:value-type="string">
            <text:p>M1019</text:p>
          </table:table-cell>
          <table:table-cell office:value-type="string" calcext:value-type="string">
            <text:p><text:a xlink:href="https://attack.mitre.org/mitigations/M1019/" xlink:type="simple">Threat Intelligence Program</text:a></text:p>
          </table:table-cell>
          <table:table-cell table:style-name="ce3"/>
          <table:table-cell table:style-name="ce4" office:value-type="string" calcext:value-type="string">
            <text:p>Establishing and running a Threat Intelligence Program is outside the scope of D3FEND.</text:p>
          </table:table-cell>
        </table:table-row>
        <table:table-row table:style-name="ro4">
          <table:table-cell office:value-type="string" calcext:value-type="string">
            <text:p>M1020</text:p>
          </table:table-cell>
          <table:table-cell office:value-type="string" calcext:value-type="string">
            <text:p><text:a xlink:href="https://attack.mitre.org/mitigations/M1020/" xlink:type="simple">SSL/TLS Inspection</text:a></text:p>
          </table:table-cell>
          <table:table-cell office:value-type="string" calcext:value-type="string">
            <text:p>D3-NTA <text:a xlink:href="https://d3fend.mitre.org/technique/d3f:NetworkTrafficAnalysis" xlink:type="simple">Network Traffic Analysis</text:a></text:p>
          </table:table-cell>
          <table:table-cell table:style-name="ce4" office:value-type="string" calcext:value-type="string">
            <text:p>D3FEND models this as an infrastructure dependency to support D3-NTA.</text:p>
          </table:table-cell>
        </table:table-row>
        <table:table-row table:style-name="ro6">
          <table:table-cell office:value-type="string" calcext:value-type="string">
            <text:p>M1021</text:p>
          </table:table-cell>
          <table:table-cell office:value-type="string" calcext:value-type="string">
            <text:p><text:a xlink:href="https://attack.mitre.org/mitigations/M1021/" xlink:type="simple">Restrict Web-Based Content</text:a></text:p>
          </table:table-cell>
          <table:table-cell office:value-type="string" calcext:value-type="string">
            <text:p>D3-ITF <text:a xlink:href="https://d3fend.mitre.org/technique/d3f:InboundTrafficFiltering" xlink:type="simple">Inbound Traffic Filtering</text:a>D3-DNSDL <text:a xlink:href="https://d3fend.mitre.org/technique/d3f:DNSDenylisting" xlink:type="simple">DNS Denylisting</text:a>D3-DNSAL <text:a xlink:href="https://d3fend.mitre.org/technique/d3f:DNSAllowlisting" xlink:type="simple">DNS Allowlisting</text:a>D3-NTA <text:a xlink:href="https://d3fend.mitre.org/technique/d3f:NetworkTrafficAnalysis" xlink:type="simple">Network Traffic Analysis</text:a>D3-FA <text:a xlink:href="https://d3fend.mitre.org/technique/d3f:FileAnalysis" xlink:type="simple">File Analysis</text:a>D3-OTF <text:a xlink:href="https://d3fend.mitre.org/technique/d3f:OutboundTrafficFiltering" xlink:type="simple">Outbound Traffic Filtering</text:a>D3-UA <text:a xlink:href="https://d3fend.mitre.org/technique/d3f:URLAnalysis" xlink:type="simple">URL Analysis</text:a></text:p>
          </table:table-cell>
          <table:table-cell table:style-name="ce4" office:value-type="string" calcext:value-type="string">
            <text:p>M1021 scope is broad, touches on an wide variety of techniques in d3fend.</text:p>
          </table:table-cell>
        </table:table-row>
        <table:table-row table:style-name="ro7">
          <table:table-cell office:value-type="string" calcext:value-type="string">
            <text:p>M1022</text:p>
          </table:table-cell>
          <table:table-cell office:value-type="string" calcext:value-type="string">
            <text:p><text:a xlink:href="https://attack.mitre.org/mitigations/M1022/" xlink:type="simple">Restrict File and Directory Permissions</text:a></text:p>
          </table:table-cell>
          <table:table-cell office:value-type="string" calcext:value-type="string">
            <text:p>D3-LFP <text:a xlink:href="https://d3fend.mitre.org/technique/d3f:LocalFilePermissions" xlink:type="simple">Local File Permissions</text:a></text:p>
          </table:table-cell>
          <table:table-cell/>
        </table:table-row>
        <table:table-row table:style-name="ro7">
          <table:table-cell office:value-type="string" calcext:value-type="string">
            <text:p>M1024</text:p>
          </table:table-cell>
          <table:table-cell office:value-type="string" calcext:value-type="string">
            <text:p><text:a xlink:href="https://attack.mitre.org/mitigations/M1024/" xlink:type="simple">Restrict Registry Permission</text:a></text:p>
          </table:table-cell>
          <table:table-cell office:value-type="string" calcext:value-type="string">
            <text:p>D3-SCP <text:a xlink:href="https://d3fend.mitre.org/technique/d3f:SystemConfigurationPermissions" xlink:type="simple">System Configuration Permissions</text:a></text:p>
          </table:table-cell>
          <table:table-cell/>
        </table:table-row>
        <table:table-row table:style-name="ro8">
          <table:table-cell office:value-type="string" calcext:value-type="string">
            <text:p>M1025</text:p>
          </table:table-cell>
          <table:table-cell office:value-type="string" calcext:value-type="string">
            <text:p><text:a xlink:href="https://attack.mitre.org/mitigations/M1025/" xlink:type="simple">Privileged Process Integrity</text:a></text:p>
          </table:table-cell>
          <table:table-cell office:value-type="string" calcext:value-type="string">
            <text:p>D3-BA <text:a xlink:href="https://d3fend.mitre.org/technique/d3f:BootloaderAuthentication" xlink:type="simple">Bootloader Authentication</text:a>D3-PSEP <text:a xlink:href="https://d3fend.mitre.org/technique/d3f:ProcessSegmentExecutionPrevention" xlink:type="simple">Process Segment Execution Prevention</text:a>D3-SCF <text:a xlink:href="https://d3fend.mitre.org/technique/d3f:SystemCallFiltering" xlink:type="simple">System Call Filtering</text:a>D3-DLIC <text:a xlink:href="https://d3fend.mitre.org/technique/d3f:DriverLoadIntegrityChecking" xlink:type="simple">Driver Load Integrity Checking</text:a></text:p>
          </table:table-cell>
          <table:table-cell/>
        </table:table-row>
        <table:table-row table:style-name="ro9">
          <table:table-cell office:value-type="string" calcext:value-type="string">
            <text:p>M1026</text:p>
          </table:table-cell>
          <table:table-cell office:value-type="string" calcext:value-type="string">
            <text:p><text:a xlink:href="https://attack.mitre.org/mitigations/M1026/" xlink:type="simple">Privileged Account Management</text:a></text:p>
          </table:table-cell>
          <table:table-cell office:value-type="string" calcext:value-type="string">
            <text:p>D3-LAM <text:a xlink:href="https://d3fend.mitre.org/technique/d3f:LocalAccountMonitoring" xlink:type="simple">Local Account Monitoring</text:a>D3-DAM <text:a xlink:href="https://d3fend.mitre.org/technique/d3f:DomainAccountMonitoring" xlink:type="simple">Domain Account Monitoring</text:a>D3-SPP <text:a xlink:href="https://d3fend.mitre.org/technique/d3f:StrongPasswordPolicy" xlink:type="simple">Strong Password Policy</text:a></text:p>
          </table:table-cell>
          <table:table-cell/>
        </table:table-row>
        <table:table-row table:style-name="ro1">
          <table:table-cell office:value-type="string" calcext:value-type="string">
            <text:p>M1027</text:p>
          </table:table-cell>
          <table:table-cell office:value-type="string" calcext:value-type="string">
            <text:p><text:a xlink:href="https://attack.mitre.org/mitigations/M1027/" xlink:type="simple">Password Policies</text:a></text:p>
          </table:table-cell>
          <table:table-cell office:value-type="string" calcext:value-type="string">
            <text:p>D3-OTP <text:a xlink:href="https://d3fend.mitre.org/technique/d3f:One-timePassword" xlink:type="simple">One-time Password</text:a>D3-SPP <text:a xlink:href="https://d3fend.mitre.org/technique/d3f:StrongPasswordPolicy" xlink:type="simple">Strong Password Policy</text:a></text:p>
          </table:table-cell>
          <table:table-cell/>
        </table:table-row>
        <table:table-row table:style-name="ro7">
          <table:table-cell office:value-type="string" calcext:value-type="string">
            <text:p>M1028</text:p>
          </table:table-cell>
          <table:table-cell office:value-type="string" calcext:value-type="string">
            <text:p><text:a xlink:href="https://attack.mitre.org/mitigations/M1028/" xlink:type="simple">Operating System Configuration</text:a></text:p>
          </table:table-cell>
          <table:table-cell office:value-type="string" calcext:value-type="string">
            <text:p>D3-PH <text:a xlink:href="https://d3fend.mitre.org/technique/d3f:PlatformHardening" xlink:type="simple">Platform Hardening</text:a></text:p>
          </table:table-cell>
          <table:table-cell/>
        </table:table-row>
        <table:table-row table:style-name="ro4">
          <table:table-cell office:value-type="string" calcext:value-type="string">
            <text:p>M1029</text:p>
          </table:table-cell>
          <table:table-cell office:value-type="string" calcext:value-type="string">
            <text:p><text:a xlink:href="https://attack.mitre.org/mitigations/M1029/" xlink:type="simple">Remote Data Storage</text:a></text:p>
          </table:table-cell>
          <table:table-cell table:style-name="ce3"/>
          <table:table-cell table:style-name="ce4" office:value-type="string" calcext:value-type="string">
            <text:p>IT disaster recovery plans are outside the current scope of D3FEND.</text:p>
          </table:table-cell>
        </table:table-row>
        <table:table-row table:style-name="ro10">
          <table:table-cell office:value-type="string" calcext:value-type="string">
            <text:p>M1030</text:p>
          </table:table-cell>
          <table:table-cell office:value-type="string" calcext:value-type="string">
            <text:p><text:a xlink:href="https://attack.mitre.org/mitigations/M1030/" xlink:type="simple">Network Segmentation</text:a></text:p>
          </table:table-cell>
          <table:table-cell office:value-type="string" calcext:value-type="string">
            <text:p>D3-ET <text:a xlink:href="https://d3fend.mitre.org/technique/d3f:EncryptedTunnels" xlink:type="simple">Encrypted Tunnels</text:a>D3-ITF <text:a xlink:href="https://d3fend.mitre.org/technique/d3f:InboundTrafficFiltering" xlink:type="simple">Inbound Traffic Filtering</text:a>D3-BDI <text:a xlink:href="https://d3fend.mitre.org/technique/d3f:BroadcastDomainIsolation" xlink:type="simple">Broadcast Domain Isolation</text:a>D3-ISVA <text:a xlink:href="https://d3fend.mitre.org/technique/d3f:InboundSessionVolumeAnalysis" xlink:type="simple">Inbound Session Volume Analysis</text:a></text:p>
          </table:table-cell>
          <table:table-cell/>
        </table:table-row>
        <table:table-row table:style-name="ro9">
          <table:table-cell office:value-type="string" calcext:value-type="string">
            <text:p>M1031</text:p>
          </table:table-cell>
          <table:table-cell office:value-type="string" calcext:value-type="string">
            <text:p><text:a xlink:href="https://attack.mitre.org/mitigations/M1031/" xlink:type="simple">Network Intrusion Prevention</text:a></text:p>
          </table:table-cell>
          <table:table-cell office:value-type="string" calcext:value-type="string">
            <text:p>D3-ITF <text:a xlink:href="https://d3fend.mitre.org/technique/d3f:InboundTrafficFiltering" xlink:type="simple">Inbound Traffic Filtering</text:a>D3-NTA <text:a xlink:href="https://d3fend.mitre.org/technique/d3f:NetworkTrafficAnalysis" xlink:type="simple">Network Traffic Analysis</text:a>D3-OTF <text:a xlink:href="https://d3fend.mitre.org/technique/d3f:OutboundTrafficFiltering" xlink:type="simple">Outbound Traffic Filtering</text:a></text:p>
          </table:table-cell>
          <table:table-cell/>
        </table:table-row>
        <table:table-row table:style-name="ro7">
          <table:table-cell office:value-type="string" calcext:value-type="string">
            <text:p>M1032</text:p>
          </table:table-cell>
          <table:table-cell office:value-type="string" calcext:value-type="string">
            <text:p><text:a xlink:href="https://attack.mitre.org/mitigations/M1032/" xlink:type="simple">Multi-factor Authentication</text:a></text:p>
          </table:table-cell>
          <table:table-cell office:value-type="string" calcext:value-type="string">
            <text:p>D3-MFA <text:a xlink:href="https://d3fend.mitre.org/technique/d3f:Multi-factorAuthentication" xlink:type="simple">Multi-factor Authentication</text:a></text:p>
          </table:table-cell>
          <table:table-cell/>
        </table:table-row>
        <table:table-row table:style-name="ro1">
          <table:table-cell office:value-type="string" calcext:value-type="string">
            <text:p>M1033</text:p>
          </table:table-cell>
          <table:table-cell office:value-type="string" calcext:value-type="string">
            <text:p><text:a xlink:href="https://attack.mitre.org/mitigations/M1033/" xlink:type="simple">Limit Software Installation</text:a></text:p>
          </table:table-cell>
          <table:table-cell office:value-type="string" calcext:value-type="string">
            <text:p>D3-EAL <text:a xlink:href="https://d3fend.mitre.org/technique/d3f:ExecutableAllowlisting" xlink:type="simple">Executable Allowlisting</text:a>D3-EDL <text:a xlink:href="https://d3fend.mitre.org/technique/d3f:ExecutableDenylisting" xlink:type="simple">Executable Denylisting</text:a></text:p>
          </table:table-cell>
          <table:table-cell/>
        </table:table-row>
        <table:table-row table:style-name="ro7">
          <table:table-cell office:value-type="string" calcext:value-type="string">
            <text:p>M1034</text:p>
          </table:table-cell>
          <table:table-cell office:value-type="string" calcext:value-type="string">
            <text:p><text:a xlink:href="https://attack.mitre.org/mitigations/M1034/" xlink:type="simple">Limit Hardware Installation</text:a></text:p>
          </table:table-cell>
          <table:table-cell office:value-type="string" calcext:value-type="string">
            <text:p>D3-IOPR <text:a xlink:href="https://d3fend.mitre.org/technique/d3f:IOPortRestriction" xlink:type="simple">IO Port Restriction</text:a></text:p>
          </table:table-cell>
          <table:table-cell/>
        </table:table-row>
        <table:table-row table:style-name="ro7">
          <table:table-cell office:value-type="string" calcext:value-type="string">
            <text:p>M1035</text:p>
          </table:table-cell>
          <table:table-cell office:value-type="string" calcext:value-type="string">
            <text:p><text:a xlink:href="https://attack.mitre.org/mitigations/M1035/" xlink:type="simple">Limit Access to Resource Over Network</text:a></text:p>
          </table:table-cell>
          <table:table-cell office:value-type="string" calcext:value-type="string">
            <text:p>D3-NI <text:a xlink:href="https://d3fend.mitre.org/technique/d3f:NetworkIsolation" xlink:type="simple">Network Isolation</text:a></text:p>
          </table:table-cell>
          <table:table-cell/>
        </table:table-row>
        <table:table-row table:style-name="ro9">
          <table:table-cell office:value-type="string" calcext:value-type="string">
            <text:p>M1036</text:p>
          </table:table-cell>
          <table:table-cell office:value-type="string" calcext:value-type="string">
            <text:p><text:a xlink:href="https://attack.mitre.org/mitigations/M1036/" xlink:type="simple">Account Use Policies</text:a></text:p>
          </table:table-cell>
          <table:table-cell office:value-type="string" calcext:value-type="string">
            <text:p>D3-AL <text:a xlink:href="https://d3fend.mitre.org/technique/d3f:AccountLocking" xlink:type="simple">Account Locking</text:a>D3-ANCI <text:a xlink:href="https://d3fend.mitre.org/technique/d3f:AuthenticationCacheInvalidation" xlink:type="simple">Authentication Cache Invalidation</text:a>D3-ANET <text:a xlink:href="https://d3fend.mitre.org/technique/d3f:AuthenticationEventThresholding" xlink:type="simple">Authentication Event Thresholding</text:a></text:p>
          </table:table-cell>
          <table:table-cell table:style-name="ce4" office:value-type="string" calcext:value-type="string">
            <text:p>D3-AZET may be related (is potentially related though not called out in ATT&amp;CK definition.)</text:p>
          </table:table-cell>
        </table:table-row>
        <table:table-row table:style-name="ro7">
          <table:table-cell office:value-type="string" calcext:value-type="string">
            <text:p>M1037</text:p>
          </table:table-cell>
          <table:table-cell office:value-type="string" calcext:value-type="string">
            <text:p><text:a xlink:href="https://attack.mitre.org/mitigations/M1037/" xlink:type="simple">Filter Network Traffic</text:a></text:p>
          </table:table-cell>
          <table:table-cell office:value-type="string" calcext:value-type="string">
            <text:p>D3-NI <text:a xlink:href="https://d3fend.mitre.org/technique/d3f:NetworkIsolation" xlink:type="simple">Network Isolation</text:a></text:p>
          </table:table-cell>
          <table:table-cell/>
        </table:table-row>
        <table:table-row table:style-name="ro8">
          <table:table-cell office:value-type="string" calcext:value-type="string">
            <text:p>M1038</text:p>
          </table:table-cell>
          <table:table-cell office:value-type="string" calcext:value-type="string">
            <text:p><text:a xlink:href="https://attack.mitre.org/mitigations/M1038/" xlink:type="simple">Execution Prevention</text:a></text:p>
          </table:table-cell>
          <table:table-cell office:value-type="string" calcext:value-type="string">
            <text:p>D3-EAL <text:a xlink:href="https://d3fend.mitre.org/technique/d3f:ExecutableAllowlisting" xlink:type="simple">Executable Allowlisting</text:a>D3-PSEP <text:a xlink:href="https://d3fend.mitre.org/technique/d3f:ProcessSegmentExecutionPrevention" xlink:type="simple">Process Segment Execution Prevention</text:a>D3-DLIC <text:a xlink:href="https://d3fend.mitre.org/technique/d3f:DriverLoadIntegrityChecking" xlink:type="simple">Driver Load Integrity Checking</text:a>D3-EDL <text:a xlink:href="https://d3fend.mitre.org/technique/d3f:ExecutableDenylisting" xlink:type="simple">Executable Denylisting</text:a></text:p>
          </table:table-cell>
          <table:table-cell/>
        </table:table-row>
        <table:table-row table:style-name="ro5">
          <table:table-cell office:value-type="string" calcext:value-type="string">
            <text:p>M1039</text:p>
          </table:table-cell>
          <table:table-cell office:value-type="string" calcext:value-type="string">
            <text:p><text:a xlink:href="https://attack.mitre.org/mitigations/M1039/" xlink:type="simple">Environment Variable Permissions</text:a></text:p>
          </table:table-cell>
          <table:table-cell office:value-type="string" calcext:value-type="string">
            <text:p>D3-ACH <text:a xlink:href="https://d3fend.mitre.org/technique/d3f:ApplicationConfigurationHardening" xlink:type="simple">Application Configuration Hardening</text:a>D3-SFA <text:a xlink:href="https://d3fend.mitre.org/technique/d3f:SystemFileAnalysis" xlink:type="simple">System File Analysis</text:a></text:p>
          </table:table-cell>
          <table:table-cell/>
        </table:table-row>
        <table:table-row table:style-name="ro11">
          <table:table-cell office:value-type="string" calcext:value-type="string">
            <text:p>M1040</text:p>
          </table:table-cell>
          <table:table-cell office:value-type="string" calcext:value-type="string">
            <text:p><text:a xlink:href="https://attack.mitre.org/mitigations/M1040/" xlink:type="simple">Behavior Prevention on Endpoint</text:a></text:p>
          </table:table-cell>
          <table:table-cell office:value-type="string" calcext:value-type="string">
            <text:p>D3-UDTA <text:a xlink:href="https://d3fend.mitre.org/technique/d3f:UserDataTransferAnalysis" xlink:type="simple">User Data Transfer Analysis</text:a>D3-WSAA <text:a xlink:href="https://d3fend.mitre.org/technique/d3f:WebSessionActivityAnalysis" xlink:type="simple">Web Session Activity Analysis</text:a>D3-RAPA <text:a xlink:href="https://d3fend.mitre.org/technique/d3f:ResourceAccessPatternAnalysis" xlink:type="simple">Resource Access Pattern Analysis</text:a>D3-JFAPA <text:a xlink:href="https://d3fend.mitre.org/technique/d3f:JobFunctionAccessPatternAnalysis" xlink:type="simple">Job Function Access Pattern Analysis</text:a>D3-UGLPA <text:a xlink:href="https://d3fend.mitre.org/technique/d3f:UserGeolocationLogonPatternAnalysis" xlink:type="simple">User Geolocation Logon Pattern Analysis</text:a>D3-AZET <text:a xlink:href="https://d3fend.mitre.org/technique/d3f:AuthorizationEventThresholding" xlink:type="simple">Authorization Event Thresholding</text:a>D3-ANET <text:a xlink:href="https://d3fend.mitre.org/technique/d3f:AuthenticationEventThresholding" xlink:type="simple">Authentication Event Thresholding</text:a>D3-SDA <text:a xlink:href="https://d3fend.mitre.org/technique/d3f:SessionDurationAnalysis" xlink:type="simple">Session Duration Analysis</text:a></text:p>
          </table:table-cell>
          <table:table-cell/>
        </table:table-row>
        <table:table-row table:style-name="ro8">
          <table:table-cell office:value-type="string" calcext:value-type="string">
            <text:p>M1041</text:p>
          </table:table-cell>
          <table:table-cell office:value-type="string" calcext:value-type="string">
            <text:p><text:a xlink:href="https://attack.mitre.org/mitigations/M1041/" xlink:type="simple">Encrypt Sensitive Information</text:a></text:p>
          </table:table-cell>
          <table:table-cell office:value-type="string" calcext:value-type="string">
            <text:p>D3-ET <text:a xlink:href="https://d3fend.mitre.org/technique/d3f:EncryptedTunnels" xlink:type="simple">Encrypted Tunnels</text:a>D3-DENCR <text:a xlink:href="https://d3fend.mitre.org/technique/d3f:DiskEncryption" xlink:type="simple">Disk Encryption</text:a>D3-FE <text:a xlink:href="https://d3fend.mitre.org/technique/d3f:FileEncryption" xlink:type="simple">File Encryption</text:a>D3-MENCR <text:a xlink:href="https://d3fend.mitre.org/technique/d3f:MessageEncryption" xlink:type="simple">Message Encryption</text:a></text:p>
          </table:table-cell>
          <table:table-cell/>
        </table:table-row>
        <table:table-row table:style-name="ro1">
          <table:table-cell office:value-type="string" calcext:value-type="string">
            <text:p>M1042</text:p>
          </table:table-cell>
          <table:table-cell office:value-type="string" calcext:value-type="string">
            <text:p><text:a xlink:href="https://attack.mitre.org/mitigations/M1042/" xlink:type="simple">Disable or Remove Feature or Program</text:a></text:p>
          </table:table-cell>
          <table:table-cell office:value-type="string" calcext:value-type="string">
            <text:p>D3-ACH <text:a xlink:href="https://d3fend.mitre.org/technique/d3f:ApplicationConfigurationHardening" xlink:type="simple">Application Configuration Hardening</text:a>D3-SCF <text:a xlink:href="https://d3fend.mitre.org/technique/d3f:SystemCallFiltering" xlink:type="simple">System Call Filtering</text:a>D3-EDL <text:a xlink:href="https://d3fend.mitre.org/technique/d3f:ExecutableDenylisting" xlink:type="simple">Executable Denylisting</text:a></text:p>
          </table:table-cell>
          <table:table-cell/>
        </table:table-row>
        <table:table-row table:style-name="ro7">
          <table:table-cell office:value-type="string" calcext:value-type="string">
            <text:p>M1043</text:p>
          </table:table-cell>
          <table:table-cell office:value-type="string" calcext:value-type="string">
            <text:p><text:a xlink:href="https://attack.mitre.org/mitigations/M1043/" xlink:type="simple">Credential Access Protection</text:a></text:p>
          </table:table-cell>
          <table:table-cell office:value-type="string" calcext:value-type="string">
            <text:p>D3-HBPI <text:a xlink:href="https://d3fend.mitre.org/technique/d3f:Hardware-basedProcessIsolation" xlink:type="simple">Hardware-based Process Isolation</text:a></text:p>
          </table:table-cell>
          <table:table-cell/>
        </table:table-row>
        <table:table-row table:style-name="ro5">
          <table:table-cell office:value-type="string" calcext:value-type="string">
            <text:p>M1044</text:p>
          </table:table-cell>
          <table:table-cell office:value-type="string" calcext:value-type="string">
            <text:p><text:a xlink:href="https://attack.mitre.org/mitigations/M1044/" xlink:type="simple">Restrict Library Loading</text:a></text:p>
          </table:table-cell>
          <table:table-cell office:value-type="string" calcext:value-type="string">
            <text:p>D3-SCF <text:a xlink:href="https://d3fend.mitre.org/technique/d3f:SystemCallFiltering" xlink:type="simple">System Call Filtering</text:a></text:p>
          </table:table-cell>
          <table:table-cell table:style-name="ce4" office:value-type="string" calcext:value-type="string">
            <text:p>D3-SCF is one possible way to filter library loading.</text:p>
          </table:table-cell>
        </table:table-row>
        <table:table-row table:style-name="ro9">
          <table:table-cell office:value-type="string" calcext:value-type="string">
            <text:p>M1045</text:p>
          </table:table-cell>
          <table:table-cell office:value-type="string" calcext:value-type="string">
            <text:p><text:a xlink:href="https://attack.mitre.org/mitigations/M1045/" xlink:type="simple">Code Signing</text:a></text:p>
          </table:table-cell>
          <table:table-cell office:value-type="string" calcext:value-type="string">
            <text:p>D3-EAL <text:a xlink:href="https://d3fend.mitre.org/technique/d3f:ExecutableAllowlisting" xlink:type="simple">Executable Allowlisting</text:a>D3-SBV <text:a xlink:href="https://d3fend.mitre.org/technique/d3f:ServiceBinaryVerification" xlink:type="simple">Service Binary Verification</text:a>D3-DLIC <text:a xlink:href="https://d3fend.mitre.org/technique/d3f:DriverLoadIntegrityChecking" xlink:type="simple">Driver Load Integrity Checking</text:a></text:p>
          </table:table-cell>
          <table:table-cell/>
        </table:table-row>
        <table:table-row table:style-name="ro5">
          <table:table-cell office:value-type="string" calcext:value-type="string">
            <text:p>M1046</text:p>
          </table:table-cell>
          <table:table-cell office:value-type="string" calcext:value-type="string">
            <text:p><text:a xlink:href="https://attack.mitre.org/mitigations/M1046/" xlink:type="simple">Boot Integrity</text:a></text:p>
          </table:table-cell>
          <table:table-cell office:value-type="string" calcext:value-type="string">
            <text:p>D3-BA <text:a xlink:href="https://d3fend.mitre.org/technique/d3f:BootloaderAuthentication" xlink:type="simple">Bootloader Authentication</text:a>D3-TBI <text:a xlink:href="https://d3fend.mitre.org/technique/d3f:TPMBootIntegrity" xlink:type="simple">TPM Boot Integrity</text:a></text:p>
          </table:table-cell>
          <table:table-cell/>
        </table:table-row>
        <table:table-row table:style-name="ro9">
          <table:table-cell office:value-type="string" calcext:value-type="string">
            <text:p>M1047</text:p>
          </table:table-cell>
          <table:table-cell office:value-type="string" calcext:value-type="string">
            <text:p><text:a xlink:href="https://attack.mitre.org/mitigations/M1047/" xlink:type="simple">Audit</text:a></text:p>
          </table:table-cell>
          <table:table-cell office:value-type="string" calcext:value-type="string">
            <text:p>D3-LAM <text:a xlink:href="https://d3fend.mitre.org/technique/d3f:LocalAccountMonitoring" xlink:type="simple">Local Account Monitoring</text:a>D3-DAM <text:a xlink:href="https://d3fend.mitre.org/technique/d3f:DomainAccountMonitoring" xlink:type="simple">Domain Account Monitoring</text:a>D3-SFA <text:a xlink:href="https://d3fend.mitre.org/technique/d3f:SystemFileAnalysis" xlink:type="simple">System File Analysis</text:a></text:p>
          </table:table-cell>
          <table:table-cell table:style-name="ce4" office:value-type="string" calcext:value-type="string">
            <text:p>M1047 scope is broad, touches on an wide variety of techniques in d3fend.</text:p>
          </table:table-cell>
        </table:table-row>
        <table:table-row table:style-name="ro12">
          <table:table-cell office:value-type="string" calcext:value-type="string">
            <text:p>M1048</text:p>
          </table:table-cell>
          <table:table-cell office:value-type="string" calcext:value-type="string">
            <text:p><text:a xlink:href="https://attack.mitre.org/mitigations/M1048/" xlink:type="simple">Application Isolation and Sandboxing</text:a></text:p>
          </table:table-cell>
          <table:table-cell office:value-type="string" calcext:value-type="string">
            <text:p>D3-DA <text:a xlink:href="https://d3fend.mitre.org/technique/d3f:DynamicAnalysis" xlink:type="simple">Dynamic Analysis</text:a>D3-SCF <text:a xlink:href="https://d3fend.mitre.org/technique/d3f:SystemCallFiltering" xlink:type="simple">System Call Filtering</text:a>D3-HBPI <text:a xlink:href="https://d3fend.mitre.org/technique/d3f:Hardware-basedProcessIsolation" xlink:type="simple">Hardware-based Process Isolation</text:a></text:p>
          </table:table-cell>
          <table:table-cell table:style-name="ce4" office:value-type="string" calcext:value-type="string">
            <text:p>"Sandboxing" is often used to describe a detection environment which includes some forms of analysis (see D3-DA.)" Many forms of isolation (e.g., quarantining) are more static in nature and simply limit software's access to system resources.</text:p>
          </table:table-cell>
        </table:table-row>
        <table:table-row table:style-name="ro2">
          <table:table-cell office:value-type="string" calcext:value-type="string">
            <text:p>M1049</text:p>
          </table:table-cell>
          <table:table-cell office:value-type="string" calcext:value-type="string">
            <text:p><text:a xlink:href="https://attack.mitre.org/mitigations/M1049/" xlink:type="simple">Antivirus/Antimalware</text:a></text:p>
          </table:table-cell>
          <table:table-cell office:value-type="string" calcext:value-type="string">
            <text:p>D3-PA <text:a xlink:href="https://d3fend.mitre.org/technique/d3f:ProcessAnalysis" xlink:type="simple">Process Analysis</text:a>D3-FH <text:a xlink:href="https://d3fend.mitre.org/technique/d3f:FileHashing" xlink:type="simple">File Hashing</text:a>D3-FCR <text:a xlink:href="https://d3fend.mitre.org/technique/d3f:FileContentRules" xlink:type="simple">File Content Rules</text:a></text:p>
          </table:table-cell>
          <table:table-cell table:style-name="ce4" office:value-type="string" calcext:value-type="string">
            <text:p>Process Analysis and subclasses.</text:p>
          </table:table-cell>
        </table:table-row>
        <table:table-row table:style-name="ro8">
          <table:table-cell office:value-type="string" calcext:value-type="string">
            <text:p>M1050</text:p>
          </table:table-cell>
          <table:table-cell office:value-type="string" calcext:value-type="string">
            <text:p><text:a xlink:href="https://attack.mitre.org/mitigations/M1050/" xlink:type="simple">Exploit Protection</text:a></text:p>
          </table:table-cell>
          <table:table-cell office:value-type="string" calcext:value-type="string">
            <text:p>D3-ITF <text:a xlink:href="https://d3fend.mitre.org/technique/d3f:InboundTrafficFiltering" xlink:type="simple">Inbound Traffic Filtering</text:a>D3-EHPV <text:a xlink:href="https://d3fend.mitre.org/technique/d3f:ExceptionHandlerPointerValidation" xlink:type="simple">Exception Handler Pointer Validation</text:a>D3-SSC <text:a xlink:href="https://d3fend.mitre.org/technique/d3f:ShadowStackComparisons" xlink:type="simple">Shadow Stack Comparisons</text:a>D3-AH <text:a xlink:href="https://d3fend.mitre.org/technique/d3f:ApplicationHardening" xlink:type="simple">Application Hardening</text:a></text:p>
          </table:table-cell>
          <table:table-cell/>
        </table:table-row>
        <table:table-row table:style-name="ro7">
          <table:table-cell office:value-type="string" calcext:value-type="string">
            <text:p>M1051</text:p>
          </table:table-cell>
          <table:table-cell office:value-type="string" calcext:value-type="string">
            <text:p><text:a xlink:href="https://attack.mitre.org/mitigations/M1051/" xlink:type="simple">Update Software</text:a></text:p>
          </table:table-cell>
          <table:table-cell office:value-type="string" calcext:value-type="string">
            <text:p>D3-SU <text:a xlink:href="https://d3fend.mitre.org/technique/d3f:SoftwareUpdate" xlink:type="simple">Software Update</text:a></text:p>
          </table:table-cell>
          <table:table-cell/>
        </table:table-row>
        <table:table-row table:style-name="ro7">
          <table:table-cell office:value-type="string" calcext:value-type="string">
            <text:p>M1052</text:p>
          </table:table-cell>
          <table:table-cell office:value-type="string" calcext:value-type="string">
            <text:p><text:a xlink:href="https://attack.mitre.org/mitigations/M1052/" xlink:type="simple">User Account Control</text:a></text:p>
          </table:table-cell>
          <table:table-cell office:value-type="string" calcext:value-type="string">
            <text:p>D3-SCF <text:a xlink:href="https://d3fend.mitre.org/technique/d3f:SystemCallFiltering" xlink:type="simple">System Call Filtering</text:a></text:p>
          </table:table-cell>
          <table:table-cell/>
        </table:table-row>
        <table:table-row table:style-name="ro3">
          <table:table-cell office:value-type="string" calcext:value-type="string">
            <text:p>M1053</text:p>
          </table:table-cell>
          <table:table-cell office:value-type="string" calcext:value-type="string">
            <text:p><text:a xlink:href="https://attack.mitre.org/mitigations/M1053/" xlink:type="simple">Data Backup</text:a></text:p>
          </table:table-cell>
          <table:table-cell table:style-name="ce3"/>
          <table:table-cell table:style-name="ce4" office:value-type="string" calcext:value-type="string">
            <text:p>Comprehensive IT disaster recovery plans are outside the current scope of D3FEND.</text:p>
          </table:table-cell>
        </table:table-row>
        <table:table-row table:style-name="ro1">
          <table:table-cell office:value-type="string" calcext:value-type="string">
            <text:p>M1054</text:p>
          </table:table-cell>
          <table:table-cell office:value-type="string" calcext:value-type="string">
            <text:p><text:a xlink:href="https://attack.mitre.org/mitigations/M1054/" xlink:type="simple">Software Configuration</text:a></text:p>
          </table:table-cell>
          <table:table-cell office:value-type="string" calcext:value-type="string">
            <text:p>D3-CP <text:a xlink:href="https://d3fend.mitre.org/technique/d3f:CertificatePinning" xlink:type="simple">Certificate Pinning</text:a>D3-ACH <text:a xlink:href="https://d3fend.mitre.org/technique/d3f:ApplicationConfigurationHardening" xlink:type="simple">Application Configuration Hardening</text:a></text:p>
          </table:table-cell>
          <table:table-cell/>
        </table:table-row>
        <table:table-row table:style-name="ro7">
          <table:table-cell office:value-type="string" calcext:value-type="string">
            <text:p>M1055</text:p>
          </table:table-cell>
          <table:table-cell office:value-type="string" calcext:value-type="string">
            <text:p><text:a xlink:href="https://attack.mitre.org/mitigations/M1055/" xlink:type="simple">Do Not Mitigate</text:a>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M1056</text:p>
          </table:table-cell>
          <table:table-cell office:value-type="string" calcext:value-type="string">
            <text:p><text:a xlink:href="https://attack.mitre.org/mitigations/M1056/" xlink:type="simple">Pre-compromise</text:a></text:p>
          </table:table-cell>
          <table:table-cell office:value-type="string" calcext:value-type="string">
            <text:p>D3-DE <text:a xlink:href="https://d3fend.mitre.org/technique/d3f:DecoyEnvironment" xlink:type="simple">Decoy Environment</text:a>D3-DO <text:a xlink:href="https://d3fend.mitre.org/technique/d3f:DecoyObject" xlink:type="simple">Decoy Object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30T18:56:53.551606626</meta:creation-date>
    <dc:date>2026-06-30T18:57:20.137863728</dc:date>
    <meta:editing-duration>PT27S</meta:editing-duration>
    <meta:editing-cycles>1</meta:editing-cycles>
    <meta:document-statistic meta:table-count="1" meta:cell-count="137" meta:object-count="0"/>
    <meta:generator>LibreOffice/26.2.4.2$Linux_X86_64 LibreOffice_project/620$Build-2</meta:generator>
  </office:meta>
</office:document-meta>
</file>